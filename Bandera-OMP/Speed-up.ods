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25966666666667cm"/>
    </style:style>
    <style:style style:name="co3" style:family="table-column">
      <style:table-column-properties fo:break-before="auto" style:column-width="2.6035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16378" table:default-cell-style-name="ce1"/>
        <table:table-row table:number-rows-repeated="2" table:style-name="ro1">
          <table:table-cell table:number-columns-repeated="6" table:style-name="Default_1"/>
          <table:table-cell table:number-columns-repeated="16378"/>
        </table:table-row>
        <table:table-row table:style-name="ro1">
          <table:table-cell table:style-name="Default_1"/>
          <table:table-cell office:value-type="string" table:style-name="ce2">
            <text:p>T.Sec=</text:p>
          </table:table-cell>
          <table:table-cell office:value-type="float" office:value="33.586927951" table:style-name="ce1">
            <text:p>33,58692795</text:p>
          </table:table-cell>
          <table:table-cell table:style-name="Default_1"/>
          <table:table-cell office:value-type="string" table:style-name="ce2">
            <text:p>T(p)=</text:p>
          </table:table-cell>
          <table:table-cell office:value-type="float" office:value="46.570999999999998" table:style-name="ce1">
            <text:p>46,571</text:p>
          </table:table-cell>
          <table:table-cell table:number-columns-repeated="16378"/>
        </table:table-row>
        <table:table-row table:style-name="ro1">
          <table:table-cell table:style-name="Default_1"/>
          <table:table-cell office:value-type="string" table:style-name="ce2">
            <text:p>T.CsPar=</text:p>
          </table:table-cell>
          <table:table-cell office:value-type="float" office:value="1.1057699999999999" table:style-name="ce1">
            <text:p>1,10577</text:p>
          </table:table-cell>
          <table:table-cell table:style-name="Default_1"/>
          <table:table-cell office:value-type="string" table:style-name="ce2">
            <text:p>Sp(p)=</text:p>
          </table:table-cell>
          <table:table-cell office:value-type="float" office:value="0.72119834126387672" table:formula="of:=[.C3]/[.F3]" table:style-name="ce1">
            <text:p>0,721198341</text:p>
          </table:table-cell>
          <table:table-cell table:number-columns-repeated="16378"/>
        </table:table-row>
        <table:table-row table:style-name="ro1">
          <table:table-cell table:style-name="Default_1"/>
          <table:table-cell office:value-type="string" table:style-name="ce2">
            <text:p>%T_CsPar=</text:p>
          </table:table-cell>
          <table:table-cell office:value-type="float" office:value="3.2922629947377408E-2" table:formula="of:=[.C4]/[.C3]" table:style-name="ce1">
            <text:p>0,03292263</text:p>
          </table:table-cell>
          <table:table-cell table:number-columns-repeated="3" table:style-name="Default_1"/>
          <table:table-cell table:number-columns-repeated="16378"/>
        </table:table-row>
        <table:table-row table:style-name="ro1">
          <table:table-cell table:style-name="Default_1"/>
          <table:table-cell office:value-type="string" table:style-name="ce2">
            <text:p>%T_CsnPar=</text:p>
          </table:table-cell>
          <table:table-cell office:value-type="float" office:value="0.96707737005262262" table:formula="of:=1-[.C5]" table:style-name="ce1">
            <text:p>0,96707737</text:p>
          </table:table-cell>
          <table:table-cell table:number-columns-repeated="3" table:style-name="Default_1"/>
          <table:table-cell table:number-columns-repeated="16378"/>
        </table:table-row>
        <table:table-row table:style-name="ro1">
          <table:table-cell table:style-name="Default_1"/>
          <table:table-cell office:value-type="string" table:style-name="ce2">
            <text:p>p=</text:p>
          </table:table-cell>
          <table:table-cell office:value-type="float" office:value="2" table:style-name="ce1">
            <text:p>2</text:p>
          </table:table-cell>
          <table:table-cell table:number-columns-repeated="3" table:style-name="Default_1"/>
          <table:table-cell table:number-columns-repeated="16378"/>
        </table:table-row>
        <table:table-row table:style-name="ro1">
          <table:table-cell table:style-name="Default_1"/>
          <table:table-cell office:value-type="string" table:style-name="ce2">
            <text:p>SpA(p)=</text:p>
          </table:table-cell>
          <table:table-cell office:value-type="float" office:value="1.0167368251237097" table:formula="of:=1/(([.C5]/[.C7])+[.C6])" table:style-name="ce1">
            <text:p>1,016736825</text:p>
          </table:table-cell>
          <table:table-cell table:number-columns-repeated="3" table:style-name="Default_1"/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JAVIER GONZÁLEZ FORTES</dc:creator>
    <meta:creation-date>2022-10-26T18:52:25Z</meta:creation-date>
    <dc:date>2025-10-24T16:50:42Z</dc:date>
    <meta:editing-cycles>7</meta:editing-cycles>
    <meta:editing-duration>PT3374S</meta:editing-duration>
  </office:meta>
</office:document-meta>
</file>